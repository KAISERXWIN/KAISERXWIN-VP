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T234" style:parent-style-name="DefaultParagraphFont" style:family="text">
      <style:text-properties fo:language="en" fo:country="US"/>
    </style:style>
    <style:style style:name="T23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T275" style:parent-style-name="DefaultParagraphFont" style:family="text">
      <style:text-properties fo:language="en" fo:country="US"/>
    </style:style>
    <style:style style:name="T27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T36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&lt;!doctype html&gt;</text:p>
      <text:p text:style-name="P2">&lt;html lang=”ru”&gt;</text:p>
      <text:p text:style-name="P3">&lt;head&gt;</text:p>
      <text:p text:style-name="P4"><text:s text:c="2"/>&lt;meta charset=”utf-8” /&gt;</text:p>
      <text:p text:style-name="P5"><text:s text:c="2"/>&lt;meta name=”viewport” content=”width=device-width, initial-scale=1” /&gt;</text:p>
      <text:p text:style-name="P6"><text:s text:c="2"/>&lt;meta name=”theme-color” content=”#0b1020” /&gt;</text:p>
      <text:p text:style-name="P7"><text:s text:c="2"/>&lt;title&gt;KAISERXWIN VPN — Подключение подписки VLESS&lt;/title&gt;</text:p>
      <text:p text:style-name="P8"><text:s text:c="2"/>&lt;style&gt;</text:p>
      <text:p text:style-name="P9"><text:s text:c="4"/>:root{</text:p>
      <text:p text:style-name="P10"><text:s text:c="6"/>--bg1:#070a12;</text:p>
      <text:p text:style-name="P11"><text:s text:c="6"/>--bg2:#0b1020;</text:p>
      <text:p text:style-name="P12"><text:s text:c="6"/>--card:#0f1733cc;</text:p>
      <text:p text:style-name="P13"><text:s text:c="6"/>--stroke:#2a3a78;</text:p>
      <text:p text:style-name="P14"><text:s text:c="6"/>--text:#eaf0ff;</text:p>
      <text:p text:style-name="P15"><text:s text:c="6"/>--muted:#a9b6e8;</text:p>
      <text:p text:style-name="P16"><text:s text:c="6"/>--accent:#7c5cff;</text:p>
      <text:p text:style-name="P17"><text:s text:c="6"/>--accent2:#22d3ee;</text:p>
      <text:p text:style-name="P18"><text:s text:c="6"/>--danger:#ff4d6d;</text:p>
      <text:p text:style-name="P19"><text:s text:c="6"/>--ok:#22c55e;</text:p>
      <text:p text:style-name="P20"><text:s text:c="6"/>--shadow: 0 20px 60px rgba(0,0,0,.55);</text:p>
      <text:p text:style-name="P21"><text:s text:c="6"/>--radius: 18px;</text:p>
      <text:p text:style-name="P22"><text:s text:c="4"/>}</text:p>
      <text:p text:style-name="P23"><text:s text:c="4"/>*{box-sizing:border-box}</text:p>
      <text:p text:style-name="P24"><text:s text:c="4"/>Body{</text:p>
      <text:p text:style-name="P25"><text:s text:c="6"/>Margin:0;</text:p>
      <text:p text:style-name="P26"><text:s text:c="6"/>Font-family: system-ui, -apple-system, Segoe UI, Roboto, Arial, “Noto Sans”, “Helvetica Neue”, sans-serif;</text:p>
      <text:p text:style-name="P27"><text:s text:c="6"/>Color:var(--text);</text:p>
      <text:p text:style-name="P28"><text:s text:c="6"/>Background:</text:p>
      <text:p text:style-name="P29"><text:s text:c="8"/>Radial-gradient(1000px 600px at 20% 10%, rgba(124,92,255,.35), transparent 55%),</text:p>
      <text:p text:style-name="P30"><text:s text:c="8"/>Radial-gradient(900px 700px at 80% 30%, rgba(34,211,238,.22), transparent 55%),</text:p>
      <text:p text:style-name="P31"><text:s text:c="8"/>Linear-gradient(180deg, var(--bg1), var(--bg2));</text:p>
      <text:p text:style-name="P32"><text:s text:c="6"/>Min-height:100vh;</text:p>
      <text:p text:style-name="P33"><text:s text:c="6"/>Display:flex;</text:p>
      <text:p text:style-name="P34"><text:s text:c="6"/>Align-items:center;</text:p>
      <text:p text:style-name="P35"><text:s text:c="6"/>Justify-content:center;</text:p>
      <text:p text:style-name="P36"><text:s text:c="6"/>Padding: 24px 14px;</text:p>
      <text:p text:style-name="P37"><text:s text:c="4"/>}</text:p>
      <text:p text:style-name="P38"><text:s text:c="4"/>.wrap{width:min(980px, 100%);}</text:p>
      <text:p text:style-name="P39"><text:s text:c="4"/>Header{</text:p>
      <text:p text:style-name="P40"><text:s text:c="6"/>Display:flex;</text:p>
      <text:p text:style-name="P41"><text:s text:c="6"/>Gap:14px;</text:p>
      <text:p text:style-name="P42"><text:s text:c="6"/>Align-items:center;</text:p>
      <text:p text:style-name="P43"><text:s text:c="6"/>Justify-content:space-between;</text:p>
      <text:p text:style-name="P44"><text:s text:c="6"/>Margin-bottom:18px;</text:p>
      <text:p text:style-name="P45"><text:s text:c="4"/>}</text:p>
      <text:p text:style-name="P46"><text:s text:c="4"/>.brand{</text:p>
      <text:p text:style-name="P47"><text:s text:c="6"/>Display:flex;</text:p>
      <text:p text:style-name="P48"><text:s text:c="6"/>Align-items:center;</text:p>
      <text:p text:style-name="P49"><text:s text:c="6"/>Gap:12px;</text:p>
      <text:p text:style-name="P50"><text:s text:c="4"/>}</text:p>
      <text:p text:style-name="P51"><text:s text:c="4"/>.logo{</text:p>
      <text:p text:style-name="P52"><text:s text:c="6"/>Width:44px;height:44px;border-radius:14px;</text:p>
      <text:p text:style-name="P53"><text:s text:c="6"/>Background:</text:p>
      <text:p text:style-name="P54"><text:s text:c="8"/>Radial-gradient(22px 22px at 30% 30%, rgba(255,255,255,.22), transparent 55%),</text:p>
      <text:p text:style-name="P55"><text:s text:c="8"/>Linear-gradient(135deg, rgba(124,92,255,1), rgba(34,211,238,1));</text:p>
      <text:p text:style-name="P56"><text:s text:c="6"/>Box-shadow: var(--shadow);</text:p>
      <text:p text:style-name="P57"><text:s text:c="6"/>Border: 1px solid rgba(255,255,255,.12);</text:p>
      <text:p text:style-name="P58"><text:s text:c="4"/>}</text:p>
      <text:p text:style-name="P59"><text:s text:c="4"/>H1{</text:p>
      <text:p text:style-name="P60"><text:s text:c="6"/>Font-size: 18px;</text:p>
      <text:p text:style-name="P61"><text:s text:c="6"/>Margin:0;</text:p>
      <text:p text:style-name="P62"><text:s text:c="6"/>Letter-spacing:.3px;</text:p>
      <text:p text:style-name="P63"><text:s text:c="4"/>}</text:p>
      <text:p text:style-name="P64"><text:s text:c="4"/>.tagline{</text:p>
      <text:p text:style-name="P65"><text:s text:c="6"/>Margin:2px 0 0;</text:p>
      <text:p text:style-name="P66"><text:s text:c="6"/>Color:var(--muted);</text:p>
      <text:p text:style-name="P67"><text:s text:c="6"/>Font-size: 13px;</text:p>
      <text:p text:style-name="P68"><text:s text:c="4"/>}</text:p>
      <text:p text:style-name="P69"><text:s text:c="4"/>.pill{</text:p>
      <text:p text:style-name="P70"><text:s text:c="6"/>Padding: 10px 12px;</text:p>
      <text:p text:style-name="P71"><text:s text:c="6"/>Border: 1px solid rgba(255,255,255,.14);</text:p>
      <text:p text:style-name="P72"><text:s text:c="6"/>Background: rgba(15,23,51,.55);</text:p>
      <text:p text:style-name="P73"><text:s text:c="6"/>Border-radius: 999px;</text:p>
      <text:p text:style-name="P74"><text:s text:c="6"/>Color: var(--muted);</text:p>
      <text:p text:style-name="P75"><text:s text:c="6"/>Font-size: 12px;</text:p>
      <text:p text:style-name="P76"><text:s text:c="6"/>Backdrop-filter: blur(10px);</text:p>
      <text:p text:style-name="P77"><text:s text:c="4"/>}</text:p>
      <text:p text:style-name="P78"/>
      <text:p text:style-name="P79"><text:s text:c="4"/>.grid{</text:p>
      <text:p text:style-name="P80"><text:s text:c="6"/>Display:grid;</text:p>
      <text:p text:style-name="P81"><text:s text:c="6"/>Grid-template-columns: 1.1fr .9fr;</text:p>
      <text:p text:style-name="P82"><text:s text:c="6"/>Gap:16px;</text:p>
      <text:p text:style-name="P83"><text:s text:c="4"/>}</text:p>
      <text:p text:style-name="P84"><text:s text:c="4"/>@media (max-width: 860px){</text:p>
      <text:p text:style-name="P85"><text:s text:c="6"/>.grid{grid-template-columns:1fr}</text:p>
      <text:p text:style-name="P86"><text:s text:c="6"/>Header{flex-direction:column; align-items:flex-start}</text:p>
      <text:p text:style-name="P87"><text:s text:c="4"/>}</text:p>
      <text:p text:style-name="P88"/>
      <text:p text:style-name="P89"><text:s text:c="4"/>.card{</text:p>
      <text:p text:style-name="P90"><text:s text:c="6"/>Background: var(--card);</text:p>
      <text:p text:style-name="P91"><text:s text:c="6"/>Border: 1px solid rgba(255,255,255,.14);</text:p>
      <text:p text:style-name="P92"><text:s text:c="6"/>Border-radius: var(--radius);</text:p>
      <text:p text:style-name="P93"><text:s text:c="6"/>Box-shadow: var(--shadow);</text:p>
      <text:p text:style-name="P94"><text:s text:c="6"/>Overflow:hidden;</text:p>
      <text:p text:style-name="P95"><text:s text:c="6"/>Backdrop-filter: blur(10px);</text:p>
      <text:p text:style-name="P96"><text:s text:c="4"/>}</text:p>
      <text:p text:style-name="P97"><text:s text:c="4"/>.card .inner{padding:18px}</text:p>
      <text:p text:style-name="P98"><text:s text:c="4"/>.title{</text:p>
      <text:p text:style-name="P99"><text:s text:c="6"/>Font-size: 16px;</text:p>
      <text:p text:style-name="P100"><text:s text:c="6"/>Margin:0 0 8px;</text:p>
      <text:p text:style-name="P101"><text:s text:c="4"/>}</text:p>
      <text:p text:style-name="P102"><text:s text:c="4"/>.muted{</text:p>
      <text:p text:style-name="P103"><text:s text:c="6"/>Color: var(--muted);</text:p>
      <text:p text:style-name="P104"><text:s text:c="6"/>Line-height: 1.45;</text:p>
      <text:p text:style-name="P105"><text:s text:c="6"/>Font-size: 13px;</text:p>
      <text:p text:style-name="P106"><text:s text:c="6"/>Margin:0;</text:p>
      <text:p text:style-name="P107"><text:s text:c="4"/>}</text:p>
      <text:p text:style-name="P108"><text:s text:c="4"/>.list{</text:p>
      <text:p text:style-name="P109"><text:s text:c="6"/>Margin: 14px 0 0;</text:p>
      <text:p text:style-name="P110"><text:s text:c="6"/>Padding:0;</text:p>
      <text:p text:style-name="P111"><text:s text:c="6"/>List-style:none;</text:p>
      <text:p text:style-name="P112"><text:s text:c="6"/>Display:grid;</text:p>
      <text:p text:style-name="P113"><text:s text:c="6"/>Gap:10px;</text:p>
      <text:p text:style-name="P114"><text:s text:c="4"/>}</text:p>
      <text:p text:style-name="P115"><text:s text:c="4"/>.li{</text:p>
      <text:p text:style-name="P116"><text:s text:c="6"/>Display:flex;</text:p>
      <text:p text:style-name="P117"><text:s text:c="6"/>Gap:10px;</text:p>
      <text:p text:style-name="P118"><text:s text:c="6"/>Align-items:flex-start;</text:p>
      <text:p text:style-name="P119"><text:s text:c="6"/>Padding: 12px 12px;</text:p>
      <text:p text:style-name="P120"><text:s text:c="6"/>Border-radius: 14px;</text:p>
      <text:p text:style-name="P121"><text:s text:c="6"/>Border: 1px solid rgba(255,255,255,.10);</text:p>
      <text:p text:style-name="P122"><text:s text:c="6"/>Background: rgba(7,10,18,.28);</text:p>
      <text:p text:style-name="P123"><text:s text:c="4"/>}</text:p>
      <text:p text:style-name="P124"><text:s text:c="4"/>.dot{</text:p>
      <text:p text:style-name="P125"><text:s text:c="6"/>Width:10px;height:10px;border-radius:99px;</text:p>
      <text:p text:style-name="P126"><text:s text:c="6"/>Margin-top: 5px;</text:p>
      <text:p text:style-name="P127"><text:s text:c="6"/>Background: linear-gradient(135deg, var(--accent), var(--accent2));</text:p>
      <text:p text:style-name="P128"><text:s text:c="6"/>Box-shadow: 0 0 0 4px rgba(124,92,255,.12);</text:p>
      <text:p text:style-name="P129"><text:s text:c="6"/>Flex: 0 0 10px;</text:p>
      <text:p text:style-name="P130"><text:s text:c="4"/>}</text:p>
      <text:p text:style-name="P131"><text:s text:c="4"/>.li b{font-size: 13px}</text:p>
      <text:p text:style-name="P132"><text:s text:c="4"/>.li span{display:block; color:var(--muted); font-size: 12px; margin-top:2px}</text:p>
      <text:p text:style-name="P133"/>
      <text:p text:style-name="P134"><text:s text:c="4"/>.subhead{</text:p>
      <text:p text:style-name="P135"><text:s text:c="6"/>Margin: 0 0 10px;</text:p>
      <text:p text:style-name="P136"><text:s text:c="6"/>Font-size: 13px;</text:p>
      <text:p text:style-name="P137"><text:s text:c="6"/>Color: var(--muted);</text:p>
      <text:p text:style-name="P138"><text:s text:c="6"/>Letter-spacing:.2px;</text:p>
      <text:p text:style-name="P139"><text:s text:c="4"/>}</text:p>
      <text:p text:style-name="P140"/>
      <text:p text:style-name="P141"><text:s text:c="4"/>.vlessbox{</text:p>
      <text:p text:style-name="P142"><text:s text:c="6"/>Border-radius: 16px;</text:p>
      <text:p text:style-name="P143"><text:s text:c="6"/>Border: 1px solid rgba(255,255,255,.14);</text:p>
      <text:p text:style-name="P144"><text:s text:c="6"/>Background: rgba(7,10,18,.35);</text:p>
      <text:p text:style-name="P145"><text:s text:c="6"/>Padding: 12px;</text:p>
      <text:p text:style-name="P146"><text:s text:c="4"/>}</text:p>
      <text:p text:style-name="P147"><text:s text:c="4"/>.row{</text:p>
      <text:p text:style-name="P148"><text:s text:c="6"/>Display:flex;</text:p>
      <text:p text:style-name="P149"><text:s text:c="6"/>Gap:10px;</text:p>
      <text:p text:style-name="P150"><text:s text:c="6"/>Flex-wrap:wrap;</text:p>
      <text:p text:style-name="P151"><text:s text:c="6"/>Align-items:center;</text:p>
      <text:p text:style-name="P152"><text:s text:c="6"/>Justify-content:space-between;</text:p>
      <text:p text:style-name="P153"><text:s text:c="4"/>}</text:p>
      <text:p text:style-name="P154"><text:s text:c="4"/>Code{</text:p>
      <text:p text:style-name="P155"><text:s text:c="6"/>Display:block;</text:p>
      <text:p text:style-name="P156"><text:s text:c="6"/>Width:100%;</text:p>
      <text:p text:style-name="P157"><text:s text:c="6"/>Padding: 12px;</text:p>
      <text:p text:style-name="P158"><text:s text:c="6"/>Border-radius: 14px;</text:p>
      <text:p text:style-name="P159"><text:s text:c="6"/>Border: 1px solid rgba(255,255,255,.10);</text:p>
      <text:p text:style-name="P160"><text:s text:c="6"/>Background: rgba(0,0,0,.25);</text:p>
      <text:p text:style-name="P161"><text:s text:c="6"/>Color: #dbe6ff;</text:p>
      <text:p text:style-name="P162"><text:s text:c="6"/>Overflow:auto;</text:p>
      <text:p text:style-name="P163"><text:s text:c="6"/>Font-size: 12px;</text:p>
      <text:p text:style-name="P164"><text:s text:c="6"/>Line-height: 1.45;</text:p>
      <text:p text:style-name="P165"><text:s text:c="6"/>Margin: 10px 0 0;</text:p>
      <text:p text:style-name="P166"><text:s text:c="6"/>User-select: all;</text:p>
      <text:p text:style-name="P167"><text:s text:c="6"/>White-space: nowrap;</text:p>
      <text:p text:style-name="P168"><text:s text:c="4"/>}</text:p>
      <text:p text:style-name="P169"><text:s text:c="4"/>.btns{</text:p>
      <text:p text:style-name="P170"><text:s text:c="6"/>Display:flex;</text:p>
      <text:p text:style-name="P171"><text:s text:c="6"/>Gap:10px;</text:p>
      <text:p text:style-name="P172"><text:s text:c="6"/>Width:100%;</text:p>
      <text:p text:style-name="P173"><text:s text:c="6"/>Margin-top: 12px;</text:p>
      <text:p text:style-name="P174"><text:s text:c="4"/>}</text:p>
      <text:p text:style-name="P175"><text:s text:c="4"/>.btn{</text:p>
      <text:p text:style-name="P176"><text:s text:c="6"/>Flex:1;</text:p>
      <text:p text:style-name="P177"><text:s text:c="6"/>Border: 0;</text:p>
      <text:p text:style-name="P178"><text:s text:c="6"/>Border-radius: 14px;</text:p>
      <text:p text:style-name="P179"><text:s text:c="6"/>Padding: 12px 12px;</text:p>
      <text:p text:style-name="P180"><text:s text:c="6"/>Font-weight: 700;</text:p>
      <text:p text:style-name="P181"><text:s text:c="6"/>Cursor:pointer;</text:p>
      <text:p text:style-name="P182"><text:s text:c="6"/>Color: #071019;</text:p>
      <text:p text:style-name="P183"><text:s text:c="6"/>Background: linear-gradient(135deg, var(--accent), var(--accent2));</text:p>
      <text:p text:style-name="P184"><text:s text:c="6"/>Box-shadow: 0 14px 40px rgba(124,92,255,.25);</text:p>
      <text:p text:style-name="P185"><text:s text:c="6"/>Transition: transform .08s ease, filter .15s ease;</text:p>
      <text:p text:style-name="P186"><text:s text:c="4"/>}</text:p>
      <text:p text:style-name="P187"><text:s text:c="4"/>.btn:active{transform: translateY(1px)}</text:p>
      <text:p text:style-name="P188"><text:s text:c="4"/>.btn.secondary{</text:p>
      <text:p text:style-name="P189"><text:s text:c="6"/>Background: rgba(255,255,255,.10);</text:p>
      <text:p text:style-name="P190"><text:s text:c="6"/>Color: var(--text);</text:p>
      <text:p text:style-name="P191"><text:s text:c="6"/>Border: 1px solid rgba(255,255,255,.14);</text:p>
      <text:p text:style-name="P192"><text:s text:c="6"/>Box-shadow:none;</text:p>
      <text:p text:style-name="P193"><text:s text:c="6"/>Font-weight: 650;</text:p>
      <text:p text:style-name="P194"><text:s text:c="4"/>}</text:p>
      <text:p text:style-name="P195"/>
      <text:p text:style-name="P196"><text:s text:c="4"/>.status{</text:p>
      <text:p text:style-name="P197"><text:s text:c="6"/>Margin-top: 10px;</text:p>
      <text:p text:style-name="P198"><text:s text:c="6"/>Font-size: 12px;</text:p>
      <text:p text:style-name="P199"><text:s text:c="6"/>Color: var(--muted);</text:p>
      <text:p text:style-name="P200"><text:s text:c="6"/>Min-height: 18px;</text:p>
      <text:p text:style-name="P201"><text:s text:c="4"/>}</text:p>
      <text:p text:style-name="P202"><text:s text:c="4"/>.status.ok{color: rgba(34,197,94,.95)}</text:p>
      <text:p text:style-name="P203"><text:s text:c="4"/>.status.err{color: rgba(255,77,109,.95)}</text:p>
      <text:p text:style-name="P204"/>
      <text:p text:style-name="P205"><text:s text:c="4"/>Footer{</text:p>
      <text:p text:style-name="P206"><text:s text:c="6"/>Margin-top: 14px;</text:p>
      <text:p text:style-name="P207"><text:s text:c="6"/>Color: rgba(169,182,232,.9);</text:p>
      <text:p text:style-name="P208"><text:s text:c="6"/>Font-size: 12px;</text:p>
      <text:p text:style-name="P209"><text:s text:c="6"/>Display:flex;</text:p>
      <text:p text:style-name="P210"><text:s text:c="6"/>Justify-content:space-between;</text:p>
      <text:p text:style-name="P211"><text:s text:c="6"/>Gap:10px;</text:p>
      <text:p text:style-name="P212"><text:s text:c="6"/>Flex-wrap:wrap;</text:p>
      <text:p text:style-name="P213"><text:s text:c="4"/>}</text:p>
      <text:p text:style-name="P214"><text:s text:c="4"/>A{color: #cfd9ff}</text:p>
      <text:p text:style-name="P215"><text:s text:c="4"/>.small{</text:p>
      <text:p text:style-name="P216"><text:s text:c="6"/>Opacity: .9;</text:p>
      <text:p text:style-name="P217"><text:s text:c="4"/>}</text:p>
      <text:p text:style-name="P218"><text:s text:c="2"/>&lt;/style&gt;</text:p>
      <text:p text:style-name="P219">&lt;/head&gt;</text:p>
      <text:p text:style-name="P220">&lt;body&gt;</text:p>
      <text:p text:style-name="P221"><text:s text:c="2"/>&lt;div class=”wrap”&gt;</text:p>
      <text:p text:style-name="P222"><text:s text:c="4"/>&lt;header&gt;</text:p>
      <text:p text:style-name="P223"><text:s text:c="6"/>&lt;div class=”brand”&gt;</text:p>
      <text:p text:style-name="P224"><text:s text:c="8"/>&lt;div class=”logo” aria-hidden=”true”&gt;&lt;/div&gt;</text:p>
      <text:p text:style-name="P225"><text:s text:c="8"/>&lt;div&gt;</text:p>
      <text:p text:style-name="P226"><text:s text:c="10"/>&lt;h1&gt;KAISERXWIN VPN&lt;/h1&gt;</text:p>
      <text:p text:style-name="P227"><text:s text:c="10"/>&lt;p class=”tagline”&gt;Подключение подписки VLESS · Быстро · Стабильно · Просто&lt;/p&gt;</text:p>
      <text:p text:style-name="P228"><text:s text:c="8"/>&lt;/div&gt;</text:p>
      <text:p text:style-name="P229"><text:s text:c="6"/>&lt;/div&gt;</text:p>
      <text:p text:style-name="P230"><text:s text:c="6"/>&lt;div class=”pill”&gt;Happ · V2RayTun · Shadowrocket · v2rayNG · и т.д.&lt;/div&gt;</text:p>
      <text:p text:style-name="P231"><text:s text:c="4"/>&lt;/header&gt;</text:p>
      <text:p text:style-name="P232"/>
      <text:p text:style-name="P233"><text:s text:c="4"/>&lt;main class=”grid”&gt;</text:p>
      <text:p text:style-name="Normal"><text:span text:style-name="T234"><text:s text:c="6"/>&lt;!—Левая карточка: инфо<text:s/></text:span><text:span text:style-name="T235"></text:span></text:p>
      <text:p text:style-name="P236"><text:s text:c="6"/>&lt;section class=”card”&gt;</text:p>
      <text:p text:style-name="P237"><text:s text:c="8"/>&lt;div class=”inner”&gt;</text:p>
      <text:p text:style-name="P238"><text:s text:c="10"/>&lt;h2 class=”title”&gt;Как подключиться&lt;/h2&gt;</text:p>
      <text:p text:style-name="P239"><text:s text:c="10"/>&lt;p class=”muted”&gt;</text:p>
      <text:p text:style-name="P240"><text:s text:c="12"/>Нажми кнопку ниже, чтобы подключить подписку VLESS. Можно либо</text:p>
      <text:p text:style-name="P241"><text:s text:c="12"/>&lt;b&gt;открыть&lt;/b&gt; ссылку напрямую (если приложение поддерживает), либо</text:p>
      <text:p text:style-name="P242"><text:s text:c="12"/>&lt;b&gt;скопировать&lt;/b&gt; и вставить её в клиент вручную.</text:p>
      <text:p text:style-name="P243"><text:s text:c="10"/>&lt;/p&gt;</text:p>
      <text:p text:style-name="P244"/>
      <text:p text:style-name="P245"><text:s text:c="10"/>&lt;ul class=”list”&gt;</text:p>
      <text:p text:style-name="P246"><text:s text:c="12"/>&lt;li class=”li”&gt;</text:p>
      <text:p text:style-name="P247"><text:s text:c="14"/>&lt;span class=”dot”&gt;&lt;/span&gt;</text:p>
      <text:p text:style-name="P248"><text:s text:c="14"/>&lt;div&gt;</text:p>
      <text:p text:style-name="P249"><text:s text:c="16"/>&lt;b&gt;1) Открой приложение&lt;/b&gt;</text:p>
      <text:p text:style-name="P250"><text:s text:c="16"/>&lt;span&gt;Happ / V2RayTun / другое приложение для VLESS.&lt;/span&gt;</text:p>
      <text:p text:style-name="P251"><text:s text:c="14"/>&lt;/div&gt;</text:p>
      <text:p text:style-name="P252"><text:s text:c="12"/>&lt;/li&gt;</text:p>
      <text:p text:style-name="P253"><text:s text:c="12"/>&lt;li class=”li”&gt;</text:p>
      <text:p text:style-name="P254"><text:s text:c="14"/>&lt;span class=”dot”&gt;&lt;/span&gt;</text:p>
      <text:p text:style-name="P255"><text:s text:c="14"/>&lt;div&gt;</text:p>
      <text:p text:style-name="P256"><text:s text:c="16"/>&lt;b&gt;2) Импорт по ссылке&lt;/b&gt;</text:p>
      <text:p text:style-name="P257"><text:s text:c="16"/>&lt;span&gt;Вставь ссылку VLESS или открой её кнопкой “Подключить”.&lt;/span&gt;</text:p>
      <text:p text:style-name="P258"><text:s text:c="14"/>&lt;/div&gt;</text:p>
      <text:p text:style-name="P259"><text:s text:c="12"/>&lt;/li&gt;</text:p>
      <text:p text:style-name="P260"><text:s text:c="12"/>&lt;li class=”li”&gt;</text:p>
      <text:p text:style-name="P261"><text:s text:c="14"/>&lt;span class=”dot”&gt;&lt;/span&gt;</text:p>
      <text:p text:style-name="P262"><text:s text:c="14"/>&lt;div&gt;</text:p>
      <text:p text:style-name="P263"><text:s text:c="16"/>&lt;b&gt;3) Обновления&lt;/b&gt;</text:p>
      <text:p text:style-name="P264"><text:s text:c="16"/>&lt;span&gt;Если это подписка — можно обновлять конфиги одной кнопкой в клиенте.&lt;/span&gt;</text:p>
      <text:p text:style-name="P265"><text:s text:c="14"/>&lt;/div&gt;</text:p>
      <text:p text:style-name="P266"><text:s text:c="12"/>&lt;/li&gt;</text:p>
      <text:p text:style-name="P267"><text:s text:c="10"/>&lt;/ul&gt;</text:p>
      <text:p text:style-name="P268"/>
      <text:p text:style-name="P269"><text:s text:c="10"/>&lt;p class=”muted” style=”margin-top:14px”&gt;</text:p>
      <text:p text:style-name="P270"><text:s text:c="12"/>Совет: если “Открыть” не сработало, используй “Скопировать”, затем импортируй ссылку в приложении.</text:p>
      <text:p text:style-name="P271"><text:s text:c="10"/>&lt;/p&gt;</text:p>
      <text:p text:style-name="P272"><text:s text:c="8"/>&lt;/div&gt;</text:p>
      <text:p text:style-name="P273"><text:s text:c="6"/>&lt;/section&gt;</text:p>
      <text:p text:style-name="P274"/>
      <text:p text:style-name="Normal"><text:span text:style-name="T275"><text:s text:c="6"/>&lt;!—Правая карточка: кнопка + ссылка<text:s/></text:span><text:span text:style-name="T276"></text:span></text:p>
      <text:p text:style-name="P277"><text:s text:c="6"/>&lt;aside class=”card”&gt;</text:p>
      <text:p text:style-name="P278"><text:s text:c="8"/>&lt;div class=”inner”&gt;</text:p>
      <text:p text:style-name="Normal"><text:span text:style-name="T279"><text:s text:c="10"/>&lt;!—ВАЖНО: текст над кнопкой как ты просил<text:s/></text:span><text:span text:style-name="T280"></text:span></text:p>
      <text:p text:style-name="P281"><text:s text:c="10"/>&lt;p class=”subhead”&gt;Подключить подписку VLESS&lt;/p&gt;</text:p>
      <text:p text:style-name="P282"/>
      <text:p text:style-name="P283"><text:s text:c="10"/>&lt;div class=”vlessbox”&gt;</text:p>
      <text:p text:style-name="P284"><text:s text:c="12"/>&lt;div class=”row”&gt;</text:p>
      <text:p text:style-name="P285"><text:s text:c="14"/>&lt;div class=”muted” style=”font-size:12px”&gt;</text:p>
      <text:p text:style-name="P286"><text:s text:c="16"/>Ваша ссылка (можно заменить в коде):</text:p>
      <text:p text:style-name="P287"><text:s text:c="14"/>&lt;/div&gt;</text:p>
      <text:p text:style-name="P288"><text:s text:c="12"/>&lt;/div&gt;</text:p>
      <text:p text:style-name="P289"/>
      <text:p text:style-name="Normal"><text:span text:style-name="T290"><text:s text:c="12"/>&lt;!—ЗАМЕНИ ЭТО на твою реальную VLESS/подписку ссылку<text:s/></text:span><text:span text:style-name="T291"></text:span></text:p>
      <text:p text:style-name="P292"><text:s text:c="12"/>&lt;code id=”vlessText”&gt;vless://UUID@your-domain.com:443?encryption=none&amp;security=tls&amp;type=ws&amp;path=%2Fvless#KAISERXWIN&lt;/code&gt;</text:p>
      <text:p text:style-name="P293"/>
      <text:p text:style-name="P294"><text:s text:c="12"/>&lt;div class=”btns”&gt;</text:p>
      <text:p text:style-name="P295"><text:s text:c="14"/>&lt;button class=”btn” id=”openBtn”&gt;Подключить подписку&lt;/button&gt;</text:p>
      <text:p text:style-name="P296"><text:s text:c="14"/>&lt;button class=”btn secondary” id=”copyBtn”&gt;Скопировать&lt;/button&gt;</text:p>
      <text:p text:style-name="P297"><text:s text:c="12"/>&lt;/div&gt;</text:p>
      <text:p text:style-name="P298"/>
      <text:p text:style-name="P299"><text:s text:c="12"/>&lt;div class=”status” id=”status”&gt;&lt;/div&gt;</text:p>
      <text:p text:style-name="P300"><text:s text:c="10"/>&lt;/div&gt;</text:p>
      <text:p text:style-name="P301"/>
      <text:p text:style-name="P302"><text:s text:c="10"/>&lt;div style=”margin-top:14px” class=”muted”&gt;</text:p>
      <text:p text:style-name="P303"><text:s text:c="12"/>&lt;b&gt;Если нужна помощь:&lt;/b&gt;&lt;br/&gt;</text:p>
      <text:p text:style-name="P304"><text:s text:c="12"/>Контакт: &lt;a href=”#” onclick=”return false;”&gt;@kaiserxwin_support&lt;/a&gt;&lt;br/&gt;</text:p>
      <text:p text:style-name="P305"><text:s text:c="12"/>&lt;span class=”small”&gt;Заменишь на свой Telegram/сайт/чат.&lt;/span&gt;</text:p>
      <text:p text:style-name="P306"><text:s text:c="10"/>&lt;/div&gt;</text:p>
      <text:p text:style-name="P307"><text:s text:c="8"/>&lt;/div&gt;</text:p>
      <text:p text:style-name="P308"><text:s text:c="6"/>&lt;/aside&gt;</text:p>
      <text:p text:style-name="P309"><text:s text:c="4"/>&lt;/main&gt;</text:p>
      <text:p text:style-name="P310"/>
      <text:p text:style-name="P311"><text:s text:c="4"/>&lt;footer&gt;</text:p>
      <text:p text:style-name="P312"><text:s text:c="6"/>&lt;div class=”small”&gt;© &lt;span id=”year”&gt;&lt;/span&gt; KAISERXWIN VPN&lt;/div&gt;</text:p>
      <text:p text:style-name="P313"><text:s text:c="6"/>&lt;div class=”small”&gt;Страница работает как обычный статический сайт (GitHub Pages / хостинг / сервер)&lt;/div&gt;</text:p>
      <text:p text:style-name="P314"><text:s text:c="4"/>&lt;/footer&gt;</text:p>
      <text:p text:style-name="P315"><text:s text:c="2"/>&lt;/div&gt;</text:p>
      <text:p text:style-name="P316"/>
      <text:p text:style-name="P317">&lt;script&gt;</text:p>
      <text:p text:style-name="P318"><text:s text:c="2"/>Const vless = document.getElementById(‘vlessText’).textContent.trim();</text:p>
      <text:p text:style-name="P319"><text:s text:c="2"/>Const statusEl = document.getElementById(‘status’);</text:p>
      <text:p text:style-name="P320"/>
      <text:p text:style-name="P321"><text:s text:c="2"/>Document.getElementById(‘year’).textContent = new Date().getFullYear();</text:p>
      <text:p text:style-name="P322"/>
      <text:p text:style-name="P323"><text:s text:c="2"/>Function setStatus(text, type){</text:p>
      <text:p text:style-name="P324"><text:s text:c="4"/>statusEl.textContent = text || ‘’;</text:p>
      <text:p text:style-name="P325"><text:s text:c="4"/>statusEl.classList.remove(‘ok’, ‘err’);</text:p>
      <text:p text:style-name="P326"><text:s text:c="4"/>if(type) statusEl.classList.add(type);</text:p>
      <text:p text:style-name="P327"><text:s text:c="2"/>}</text:p>
      <text:p text:style-name="P328"/>
      <text:p text:style-name="P329"><text:s text:c="2"/>// Открыть vless://</text:p>
      <text:p text:style-name="P330"><text:s text:c="2"/>Document.getElementById(‘openBtn’).addEventListener(‘click’, () =&gt; {</text:p>
      <text:p text:style-name="P331"><text:s text:c="4"/>setStatus(‘Открываю ссылку…’, ‘’);</text:p>
      <text:p text:style-name="P332"><text:s text:c="4"/>try{</text:p>
      <text:p text:style-name="P333"><text:s text:c="6"/>// На мобильных часто откроет приложение, если оно зарегистрировало схему vless://</text:p>
      <text:p text:style-name="P334"><text:s text:c="6"/>Window.location.href = vless;</text:p>
      <text:p text:style-name="P335"><text:s text:c="6"/>setTimeout(() =&gt; setStatus(‘Если ничего не открылось — нажми “Скопировать” и импортируй вручную.’, ‘’), 900);</text:p>
      <text:p text:style-name="P336"><text:s text:c="4"/>} catch€{</text:p>
      <text:p text:style-name="P337"><text:s text:c="6"/>setStatus(‘Не удалось открыть ссылку. Скопируй и вставь вручную.’, ‘err’);</text:p>
      <text:p text:style-name="P338"><text:s text:c="4"/>}</text:p>
      <text:p text:style-name="P339"><text:s text:c="2"/>});</text:p>
      <text:p text:style-name="P340"/>
      <text:p text:style-name="P341"><text:s text:c="2"/>// Копировать</text:p>
      <text:p text:style-name="P342"><text:s text:c="2"/>Document.getElementById(‘copyBtn’).addEventListener(‘click’, async () =&gt; {</text:p>
      <text:p text:style-name="P343"><text:s text:c="4"/>Try{</text:p>
      <text:p text:style-name="P344"><text:s text:c="6"/>Await navigator.clipboard.writeText(vless);</text:p>
      <text:p text:style-name="P345"><text:s text:c="6"/>setStatus(‘Ссылка скопирована в буфер обмена.’, ‘ok’);</text:p>
      <text:p text:style-name="P346"><text:s text:c="4"/>} catch€{</text:p>
      <text:p text:style-name="P347"><text:s text:c="6"/>// запасной вариант</text:p>
      <text:p text:style-name="P348"><text:s text:c="6"/>Try{</text:p>
      <text:p text:style-name="P349"><text:s text:c="8"/>Const range = document.createRange();</text:p>
      <text:p text:style-name="P350"><text:s text:c="8"/>Range.selectNode(document.getElementById(‘vlessText’));</text:p>
      <text:p text:style-name="P351"><text:s text:c="8"/>Const sel = window.getSelection();</text:p>
      <text:p text:style-name="P352"><text:s text:c="8"/>Sel.removeAllRanges();</text:p>
      <text:p text:style-name="P353"><text:s text:c="8"/>Sel.addRange(range);</text:p>
      <text:p text:style-name="P354"><text:s text:c="8"/>Document.execCommand(‘copy’);</text:p>
      <text:p text:style-name="P355"><text:s text:c="8"/>Sel.removeAllRanges();</text:p>
      <text:p text:style-name="P356"><text:s text:c="8"/>setStatus(‘Ссылка скопирована (fallback).’, ‘ok’);</text:p>
      <text:p text:style-name="P357"><text:s text:c="6"/>} catch(err){</text:p>
      <text:p text:style-name="P358"><text:s text:c="8"/>setStatus(‘Не удалось скопировать. Выдели ссылку и скопируй вручную.’, ‘err’);</text:p>
      <text:p text:style-name="P359"><text:s text:c="6"/>}</text:p>
      <text:p text:style-name="P360"><text:s text:c="4"/>}</text:p>
      <text:p text:style-name="P361"><text:s text:c="2"/>});</text:p>
      <text:p text:style-name="P362">&lt;/script&gt;</text:p>
      <text:p text:style-name="P363">&lt;/body&gt;</text:p>
      <text:p text:style-name="Normal"><text:span text:style-name="T364">&lt;/html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od Face</meta:initial-creator>
    <dc:creator>Good Face</dc:creator>
    <meta:creation-date>2026-05-14T17:24:00Z</meta:creation-date>
    <dc:date>2026-05-14T17:24:00Z</dc:date>
    <meta:template xlink:href="Normal.dotm" xlink:type="simple"/>
    <meta:editing-cycles>2</meta:editing-cycles>
    <meta:editing-duration>PT120S</meta:editing-duration>
    <meta:document-statistic meta:page-count="1" meta:paragraph-count="20" meta:word-count="1535" meta:character-count="10271" meta:row-count="72" meta:non-whitespace-character-count="8756"/>
  </office:meta>
</office:document-meta>
</file>